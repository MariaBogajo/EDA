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style:text-autospace="none"/>
      <style:text-properties fo:color="#000000" style:text-line-through-style="none" style:text-line-through-type="none" style:font-name="Times New Roman1" fo:font-size="14pt" fo:language="es" fo:country="ES" style:text-underline-style="none" style:font-name-asian="Times New Roman1" style:font-size-asian="14pt" style:font-name-complex="Times New Roman1" style:font-size-complex="14pt"/>
    </style:style>
    <style:style style:name="P2" style:family="paragraph" style:parent-style-name="Default">
      <style:paragraph-properties style:text-autospace="none"/>
      <style:text-properties fo:color="#000000" style:text-line-through-style="none" style:text-line-through-type="none" style:font-name="Times New Roman1" fo:font-size="14pt" fo:language="es" fo:country="ES" style:text-underline-style="none" style:font-name-asian="Times New Roman1" style:font-size-asian="14pt" style:font-name-complex="Times New Roman1" style:font-size-complex="14pt"/>
    </style:style>
    <style:style style:name="P3" style:family="paragraph" style:parent-style-name="Default">
      <style:paragraph-properties style:text-autospace="none"/>
      <style:text-properties fo:color="#000000" style:text-line-through-style="none" style:text-line-through-type="none" style:font-name="Times New Roman1" fo:font-size="14pt" style:text-underline-style="none" style:font-name-asian="Times New Roman1" style:font-size-asian="14pt" style:font-name-complex="Times New Roman1" style:font-size-complex="14pt"/>
    </style:style>
    <style:style style:name="P4" style:family="paragraph" style:parent-style-name="Default">
      <style:paragraph-properties fo:break-before="page" style:text-autospace="none"/>
      <style:text-properties fo:color="#000000" style:text-line-through-style="none" style:text-line-through-type="none" style:font-name="Times New Roman1" fo:font-size="14pt" style:text-underline-style="none" style:font-name-asian="Times New Roman1" style:font-size-asian="14pt" style:font-name-complex="Times New Roman1" style:font-size-complex="14pt"/>
    </style:style>
    <style:style style:name="P5" style:family="paragraph" style:parent-style-name="Default">
      <style:paragraph-properties style:text-autospace="none"/>
      <style:text-properties fo:color="#000000" style:text-line-through-style="none" style:text-line-through-type="none" style:font-name="Times New Roman1" fo:font-size="14pt" fo:language="es" fo:country="ES" style:text-underline-style="none" officeooo:paragraph-rsid="0018263c" style:font-name-asian="Times New Roman1" style:font-size-asian="14pt" style:font-name-complex="Times New Roman1" style:font-size-complex="14pt"/>
    </style:style>
    <style:style style:name="T1" style:family="text">
      <style:text-properties officeooo:rsid="0017c9fd"/>
    </style:style>
    <style:style style:name="T2" style:family="text">
      <style:text-properties officeooo:rsid="00192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 índice debería contener <text:span text:style-name="T1">el número de</text:span> página donde se encuentra cada apartado, que además se proporcionaba en la documentación modelo, que lo hacía de manera automática.</text:p>
      <text:p text:style-name="P3"/>
      <text:p text:style-name="P3">El método de ordenación que usáis es cuadrático, y ello puede plantear problemas de tiempo al ordenar toda la lista. ¿Habéis probado cuánto tarda al ordenar toda la lista de actores?</text:p>
      <text:p text:style-name="P3"/>
      <text:p text:style-name="P1">El código importante de una aplicación no puede ir en un main. Esto indica un diseño incorrecto. El código debe ir asociado a clases, mediante métodos.</text:p>
      <text:p text:style-name="P1"/>
      <text:p text:style-name="P2">La documentación está hecha para que alguien la lea, y esa no es manera de presentar el código de un programa. Simplemente habéis copiado y pegado el código, y muchas líneas pasan de una línea a la siguiente, haciendo el código muy difícil de leer. El hacerlo legible era vuestro trabajo y no lo habéis hecho bien.</text:p>
      <text:p text:style-name="P2"/>
      <text:p text:style-name="P2">Después de que habéis cursado PMOO, esperaba que para explicar las clases presentéis un diagrama de clases, con los nombres de las clases, sus atributos y métodos, indicando por cada uno sus parámetros y si son públicos <text:s/>no. La breve explicación que dáis es totalmente insuficiente.</text:p>
      <text:p text:style-name="P2"/>
      <text:p text:style-name="P5">El código que presentáis, ¿Lo habéis probado con el fichero grande de actores? Es muy importante que vuestra práctica sea probada con <text:span text:style-name="T2">todo el fichero de datos</text:span>.</text:p>
      <text:p text:style-name="P2"/>
      <text:p text:style-name="P2">Se pedía calcular el coste de los métodos principales y no se ha hecho. Este era un aspecto muy importante en esta prác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20:19:14.26</meta:creation-date>
    <dc:date>2015-09-13T18:48:13.799484055</dc:date>
    <meta:editing-duration>PT2H39M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37" meta:character-count="1383" meta:non-whitespace-character-count="1152"/>
  </office:meta>
</office:document-meta>
</file>